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C0000000C0FB09144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style:font-face style:name="OpenSymbol" svg:font-family="OpenSymbol" style:font-charset="x-symbol"/>
    <style:font-face style:name="Roboto" svg:font-family="Roboto, Helvetica, sans-serif"/>
  </office:font-face-decls>
  <office:automatic-styles>
    <style:style style:name="Tableau1" style:family="table">
      <style:table-properties style:width="10.091cm" table:align="left"/>
    </style:style>
    <style:style style:name="Tableau1.A" style:family="table-column">
      <style:table-column-properties style:column-width="1.789cm"/>
    </style:style>
    <style:style style:name="Tableau1.B" style:family="table-column">
      <style:table-column-properties style:column-width="8.303cm"/>
    </style:style>
    <style:style style:name="Tableau1.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Heading_20_2">
      <style:paragraph-properties fo:margin-left="0cm" fo:margin-right="0cm" fo:orphans="2" fo:widows="2" fo:text-indent="0cm" style:auto-text-indent="false"/>
    </style:style>
    <style:style style:name="P3" style:family="paragraph" style:parent-style-name="Heading_20_2">
      <style:paragraph-properties fo:margin-left="0cm" fo:margin-right="0cm" fo:margin-top="0cm" fo:margin-bottom="0cm" style:contextual-spacing="false" style:line-height-at-least="0.688cm" fo:orphans="2" fo:widows="2" fo:text-indent="0cm" style:auto-text-indent="false" fo:padding="0cm" fo:border="none"/>
      <style:text-properties fo:font-variant="normal" fo:text-transform="none" fo:color="#000000" loext:opacity="100%" style:font-name="Roboto" fo:font-size="15pt" fo:letter-spacing="normal" fo:font-style="normal" fo:font-weight="bold"/>
    </style:style>
    <style:style style:name="P4" style:family="paragraph" style:parent-style-name="Text_20_body">
      <style:paragraph-properties fo:margin-left="0cm" fo:margin-right="0cm" fo:margin-top="0cm" fo:margin-bottom="0cm" style:contextual-spacing="false" style:line-height-at-least="0.344cm" fo:text-indent="0cm" style:auto-text-indent="false" fo:padding="0cm" fo:border="none"/>
    </style:style>
    <style:style style:name="P5" style:family="paragraph" style:parent-style-name="Text_20_body" style:list-style-name="L1">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style>
    <style:style style:name="P6" style:family="paragraph" style:parent-style-name="Text_20_body" style:list-style-name="L1">
      <style:paragraph-properties fo:margin-left="0cm" fo:margin-right="0cm" fo:margin-top="0cm" fo:margin-bottom="0.212cm" style:contextual-spacing="false" style:line-height-at-least="0.344cm"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style>
    <style:style style:name="P8" style:family="paragraph" style:parent-style-name="Text_20_body" style:list-style-name="L2">
      <style:paragraph-properties fo:margin-left="0cm" fo:margin-right="0cm" fo:margin-top="0cm" fo:margin-bottom="0.212cm" style:contextual-spacing="false" style:line-height-at-least="0.344cm" fo:orphans="2" fo:widows="2" fo:text-indent="0cm" style:auto-text-indent="false" fo:padding="0cm" fo:border="none"/>
    </style:style>
    <style:style style:name="P9" style:family="paragraph" style:parent-style-name="Text_20_body">
      <style:paragraph-properties fo:margin-left="0cm" fo:margin-right="0cm" fo:margin-top="0cm" fo:margin-bottom="0.212cm" style:contextual-spacing="false" fo:orphans="2" fo:widows="2" fo:text-indent="0cm" style:auto-text-indent="false" fo:padding="0cm" fo:border="none"/>
      <style:text-properties fo:font-variant="normal" fo:text-transform="none" fo:color="#4f4f4f" loext:opacity="100%" style:font-name="Open Sans" fo:font-size="12pt" fo:letter-spacing="normal" fo:font-style="normal" fo:font-weight="bold"/>
    </style:style>
    <style:style style:name="P10" style:family="paragraph" style:parent-style-name="Heading_20_2">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2d2d2d" loext:opacity="100%" style:font-name="Open Sans" fo:font-size="19.5pt" fo:letter-spacing="normal" fo:font-style="normal" fo:font-weight="normal"/>
    </style:style>
    <style:style style:name="P11"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P12"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4f4f4f" loext:opacity="100%" style:font-name="Open Sans" fo:font-size="12pt" fo:letter-spacing="normal" fo:font-style="normal" fo:font-weight="bold"/>
    </style:style>
    <style:style style:name="P13" style:family="paragraph" style:parent-style-name="Heading_20_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2d2d2d" loext:opacity="100%" style:font-name="Open Sans" fo:font-size="16.5pt" fo:letter-spacing="normal" fo:font-style="normal" fo:font-weight="normal"/>
    </style:style>
    <style:style style:name="P14" style:family="paragraph" style:parent-style-name="Text_20_body" style:list-style-name="L3">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style>
    <style:style style:name="P15" style:family="paragraph" style:parent-style-name="Text_20_body" style:list-style-name="L4">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16" style:family="paragraph" style:parent-style-name="Text_20_body" style:list-style-name="L5">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17" style:family="paragraph" style:parent-style-name="Text_20_body" style:list-style-name="L6">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18" style:family="paragraph" style:parent-style-name="Text_20_body" style:list-style-name="L7">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19" style:family="paragraph" style:parent-style-name="Text_20_body" style:list-style-name="L8">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20" style:family="paragraph" style:parent-style-name="Text_20_body" style:list-style-name="L9">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21" style:family="paragraph" style:parent-style-name="Text_20_body" style:list-style-name="L10">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style>
    <style:style style:name="P22" style:family="paragraph" style:parent-style-name="Text_20_body" style:list-style-name="L11">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style>
    <style:style style:name="P23" style:family="paragraph" style:parent-style-name="Text_20_body" style:list-style-name="L12">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24" style:family="paragraph" style:parent-style-name="Heading_20_2">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4f4f4f" loext:opacity="100%" style:font-name="Open Sans" fo:font-size="12pt" fo:letter-spacing="normal" fo:font-style="normal" fo:font-weight="bold"/>
    </style:style>
    <style:style style:name="P25" style:family="paragraph" style:parent-style-name="Text_20_body" style:list-style-name="L13">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26" style:family="paragraph" style:parent-style-name="Table_20_Heading">
      <style:paragraph-properties fo:margin-left="0cm" fo:margin-right="0cm" fo:text-indent="0cm" style:auto-text-indent="false"/>
    </style:style>
    <style:style style:name="P27" style:family="paragraph" style:parent-style-name="Table_20_Contents">
      <style:paragraph-properties fo:margin-left="0cm" fo:margin-right="0cm" fo:text-indent="0cm" style:auto-text-indent="false"/>
    </style:style>
    <style:style style:name="P28" style:family="paragraph" style:parent-style-name="Heading_20_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4f4f4f" loext:opacity="100%" style:font-name="Open Sans" fo:font-size="12pt" fo:letter-spacing="normal" fo:font-style="normal" fo:font-weight="bold"/>
    </style:style>
    <style:style style:name="P29" style:family="paragraph" style:parent-style-name="Text_20_body" style:list-style-name="L14">
      <loext:graphic-properties draw:fill="none" draw:fill-color="#ffffff" draw:opacity="100%"/>
      <style:paragraph-properties fo:margin-left="0cm" fo:margin-right="0cm" fo:margin-top="0cm" fo:margin-bottom="0cm" style:contextual-spacing="false" style:line-height-at-least="0.688cm" fo:orphans="2" fo:widows="2" fo:text-indent="0cm" style:auto-text-indent="false" fo:background-color="transparent" fo:padding="0cm" fo:border="none"/>
      <style:text-properties fo:font-variant="normal" fo:text-transform="none" fo:color="#4f4f4f" loext:opacity="100%" style:font-name="Open Sans" fo:font-size="12pt" fo:letter-spacing="normal" fo:font-style="normal" fo:font-weight="bold"/>
    </style:style>
    <style:style style:name="P30" style:family="paragraph" style:parent-style-name="Text_20_body">
      <style:paragraph-properties fo:margin-left="0cm" fo:margin-right="0cm" fo:margin-top="0cm" fo:margin-bottom="0cm" style:contextual-spacing="false" fo:text-align="left" style:justify-single-word="false" fo:orphans="2" fo:widows="2" fo:text-indent="0cm" style:auto-text-indent="false" fo:padding="0cm" fo:border="none"/>
    </style:style>
    <style:style style:name="P31" style:family="paragraph" style:parent-style-name="Text_20_body">
      <loext:graphic-properties draw:fill="solid" draw:fill-color="#ffffff" draw:opacity="100%"/>
      <style:paragraph-properties fo:margin-left="0cm" fo:margin-right="0cm" fo:margin-top="0cm" fo:margin-bottom="0cm" style:contextual-spacing="false" fo:text-align="left" style:justify-single-word="false" fo:orphans="2" fo:widows="2" fo:text-indent="0cm" style:auto-text-indent="false" fo:background-color="#ffffff" fo:padding="0cm" fo:border="none"/>
      <style:text-properties fo:font-variant="normal" fo:text-transform="none" fo:color="#4f4f4f" loext:opacity="100%" style:font-name="Open Sans" fo:font-size="12pt" fo:letter-spacing="normal" fo:font-style="normal" fo:font-weight="bold"/>
    </style:style>
    <style:style style:name="P32" style:family="paragraph" style:parent-style-name="Text_20_body">
      <loext:graphic-properties draw:fill="solid" draw:fill-color="#ffffff" draw:opacity="100%"/>
      <style:paragraph-properties fo:margin-left="0cm" fo:margin-right="0cm" fo:margin-top="0cm" fo:margin-bottom="0cm" style:contextual-spacing="false" fo:text-align="left" style:justify-single-word="false" fo:orphans="2" fo:widows="2" fo:text-indent="0cm" style:auto-text-indent="false" fo:background-color="#ffffff" fo:padding="0cm" fo:border="none"/>
      <style:text-properties fo:font-variant="normal" fo:text-transform="none" fo:color="#4f4f4f" loext:opacity="100%" fo:letter-spacing="normal"/>
    </style:style>
    <style:style style:name="P33" style:family="paragraph" style:parent-style-name="Text_20_body">
      <loext:graphic-properties draw:fill="solid" draw:fill-color="#ffffff" draw:opacity="100%"/>
      <style:paragraph-properties fo:margin-left="0cm" fo:margin-right="0cm" fo:margin-top="0cm" fo:margin-bottom="0cm" style:contextual-spacing="false" fo:text-align="left" style:justify-single-word="false" fo:orphans="2" fo:widows="2" fo:text-indent="0cm" style:auto-text-indent="false" fo:background-color="#ffffff" fo:padding="0cm" fo:border="none"/>
    </style:style>
    <style:style style:name="P34" style:family="paragraph" style:parent-style-name="Heading_20_2">
      <style:paragraph-properties fo:margin-left="0cm" fo:margin-right="0cm" fo:orphans="2" fo:widows="2" fo:text-indent="0cm" style:auto-text-indent="false"/>
      <style:text-properties fo:font-variant="normal" fo:text-transform="none" fo:color="#2d2d2d" loext:opacity="100%" style:font-name="Open Sans" fo:font-size="19.5pt" fo:letter-spacing="normal" fo:font-style="normal" fo:font-weight="normal"/>
    </style:style>
    <style:style style:name="P35" style:family="paragraph" style:parent-style-name="Text_20_body" style:list-style-name="L15">
      <loext:graphic-properties draw:fill="none" draw:fill-color="#ffffff" draw:opacity="100%"/>
      <style:paragraph-properties fo:margin-left="0cm" fo:margin-right="0cm" fo:margin-top="0cm" fo:margin-bottom="0cm" style:contextual-spacing="false" style:line-height-at-least="0.688cm" fo:text-align="left" style:justify-single-word="false" fo:orphans="2" fo:widows="2" fo:text-indent="0cm" style:auto-text-indent="false" fo:background-color="transparent" fo:padding="0cm" fo:border="none"/>
    </style:style>
    <style:style style:name="P36" style:family="paragraph" style:parent-style-name="Heading_20_2">
      <loext:graphic-properties draw:fill="solid" draw:fill-color="#ffffff" draw:opacity="100%"/>
      <style:paragraph-properties fo:margin-left="0cm" fo:margin-right="0cm" fo:margin-top="0cm" fo:margin-bottom="0cm" style:contextual-spacing="false" fo:text-align="left" style:justify-single-word="false" fo:orphans="2" fo:widows="2" fo:text-indent="0cm" style:auto-text-indent="false" fo:background-color="#ffffff" fo:padding="0cm" fo:border="none"/>
      <style:text-properties fo:font-variant="normal" fo:text-transform="none" fo:color="#2d2d2d" loext:opacity="100%" style:font-name="Open Sans" fo:font-size="19.5pt" fo:letter-spacing="normal" fo:font-style="normal" fo:font-weight="normal"/>
    </style:style>
    <style:style style:name="P37" style:family="paragraph" style:parent-style-name="Text_20_body" style:list-style-name="L16">
      <loext:graphic-properties draw:fill="none" draw:fill-color="#ffffff" draw:opacity="100%"/>
      <style:paragraph-properties fo:margin-left="0cm" fo:margin-right="0cm" fo:margin-top="0cm" fo:margin-bottom="0cm" style:contextual-spacing="false" style:line-height-at-least="0.688cm" fo:text-align="left" style:justify-single-word="false" fo:orphans="2" fo:widows="2" fo:text-indent="0cm" style:auto-text-indent="false" fo:background-color="transparent" fo:padding="0cm" fo:border="none"/>
    </style:style>
    <style:style style:name="P38" style:family="paragraph" style:parent-style-name="Heading_20_2">
      <loext:graphic-properties draw:fill="solid" draw:fill-color="#ffffff" draw:opacity="100%"/>
      <style:paragraph-properties fo:margin-left="0cm" fo:margin-right="0cm" fo:margin-top="0cm" fo:margin-bottom="0cm" style:contextual-spacing="false" fo:text-align="left" style:justify-single-word="false" fo:orphans="2" fo:widows="2" fo:text-indent="0cm" style:auto-text-indent="false" fo:background-color="#ffffff" fo:padding="0cm" fo:border="none"/>
      <style:text-properties fo:font-variant="normal" fo:text-transform="none" fo:color="#4f4f4f" loext:opacity="100%" style:font-name="Open Sans" fo:font-size="12pt" fo:letter-spacing="normal" fo:font-style="normal" fo:font-weight="bold"/>
    </style:style>
    <style:style style:name="P39" style:family="paragraph" style:parent-style-name="Text_20_body" style:list-style-name="L17">
      <loext:graphic-properties draw:fill="none" draw:fill-color="#ffffff" draw:opacity="100%"/>
      <style:paragraph-properties fo:margin-left="0cm" fo:margin-right="0cm" fo:margin-top="0cm" fo:margin-bottom="0cm" style:contextual-spacing="false" style:line-height-at-least="0.688cm" fo:text-align="left" style:justify-single-word="false" fo:orphans="2" fo:widows="2" fo:text-indent="0cm" style:auto-text-indent="false" fo:background-color="transparent" fo:padding="0cm" fo:border="none"/>
    </style:style>
    <style:style style:name="P40" style:family="paragraph" style:parent-style-name="Text_20_body" style:list-style-name="L18">
      <loext:graphic-properties draw:fill="none" draw:fill-color="#ffffff" draw:opacity="100%"/>
      <style:paragraph-properties fo:margin-left="0cm" fo:margin-right="0cm" fo:margin-top="0cm" fo:margin-bottom="0cm" style:contextual-spacing="false" style:line-height-at-least="0.688cm" fo:text-align="left" style:justify-single-word="false" fo:orphans="2" fo:widows="2" fo:text-indent="0cm" style:auto-text-indent="false" fo:background-color="transparent" fo:padding="0cm" fo:border="none"/>
    </style:style>
    <style:style style:name="T1" style:family="text">
      <style:text-properties fo:font-variant="normal" fo:text-transform="none" fo:color="#242424" loext:opacity="100%" fo:font-family="'Segoe UI', 'Segoe UI Web (West European)', apple-system, BlinkMacSystemFont, Roboto, 'Helvetica Neue', sans-serif" fo:font-size="11.25pt" fo:letter-spacing="normal" fo:font-style="normal" fo:font-weight="normal" officeooo:rsid="0006b2f6"/>
    </style:style>
    <style:style style:name="T2" style:family="text">
      <style:text-properties fo:font-variant="normal" fo:text-transform="none" fo:color="#242424" loext:opacity="100%" fo:font-family="'Segoe UI', 'Segoe UI Web (West European)', apple-system, BlinkMacSystemFont, Roboto, 'Helvetica Neue', sans-serif" fo:font-size="11.25pt" fo:letter-spacing="normal" fo:font-style="normal" fo:font-weight="normal"/>
    </style:style>
    <style:style style:name="T3" style:family="text">
      <style:text-properties fo:font-variant="normal" fo:text-transform="none" fo:color="#000000" loext:opacity="100%" style:font-name="Roboto" fo:font-size="15pt" fo:letter-spacing="normal" fo:font-style="normal" fo:font-weight="bold"/>
    </style:style>
    <style:style style:name="T4" style:family="text">
      <style:text-properties fo:font-weight="bold"/>
    </style:style>
    <style:style style:name="T5" style:family="text">
      <style:text-properties fo:font-variant="normal" fo:text-transform="none" fo:color="#000000" loext:opacity="100%" style:font-name="Roboto" fo:font-size="12pt" fo:letter-spacing="normal" fo:font-style="normal" fo:font-weight="normal"/>
    </style:style>
    <style:style style:name="T6" style:family="text">
      <style:text-properties fo:font-variant="normal" fo:text-transform="none" fo:color="#000000" loext:opacity="75%" style:text-line-through-style="none" style:text-line-through-type="none" style:text-underline-style="none" style:text-blinking="false" fo:background-color="#ffffff" loext:char-shading-value="0" loext:padding="0cm" loext:border="none"/>
    </style:style>
    <style:style style:name="T7" style:family="text">
      <style:text-properties fo:font-variant="normal" fo:text-transform="none" fo:color="#000000" loext:opacity="75%" style:text-line-through-style="none" style:text-line-through-type="none" style:font-name="Roboto" fo:font-size="8.25pt" fo:font-style="normal" style:text-underline-style="none" fo:font-weight="normal" style:text-blinking="false" fo:background-color="#f8f4f1" loext:char-shading-value="0" loext:padding="0cm" loext:border="none"/>
    </style:style>
    <style:style style:name="T8" style:family="text">
      <style:text-properties fo:font-variant="normal" fo:text-transform="none" fo:color="#4f4f4f" loext:opacity="100%" style:font-name="Open Sans" fo:font-size="12pt" fo:letter-spacing="normal" fo:font-style="normal" fo:font-weight="bold"/>
    </style:style>
    <style:style style:name="T9" style:family="text">
      <style:text-properties fo:font-variant="normal" fo:text-transform="none" fo:color="#4f4f4f" loext:opacity="100%" style:font-name="Open Sans" fo:font-size="12pt" fo:letter-spacing="normal" fo:font-style="normal" fo:font-weight="bold" fo:background-color="transparent" loext:char-shading-value="0" loext:padding="0cm" loext:border="none"/>
    </style:style>
    <style:style style:name="T10" style:family="text">
      <style:text-properties fo:font-variant="normal" fo:text-transform="none" fo:color="#aa5501" loext:opacity="100%" style:text-line-through-style="none" style:text-line-through-type="none" style:font-name="Open Sans" fo:font-size="12pt" fo:letter-spacing="normal" fo:font-style="normal" style:text-underline-style="none" fo:font-weight="bold"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text:span><text:span text:style-name="T2"> Backgammon</text:span><text:line-break/><text:line-break/><text:span text:style-name="T2">#### Chapitre 1 : Les Fondations (L'Introduction)</text:span><text:line-break/><text:span text:style-name="T2">* **1.1 Qu'est-ce que le Backgammon ?**</text:span><text:line-break/><text:line-break/><text:span text:style-name="T2">* **1.2 La Matériel et le Plateau.**</text:span><text:line-break/><text:line-break/><text:line-break/><text:span text:style-name="T2">* **1.3 Le But du Jeu.**</text:span><text:line-break/><text:line-break/><text:line-break/><text:span text:style-name="T2">#### Chapitre 2 : Le Début de la Partie (La Mise en Place)</text:span><text:line-break/><text:span text:style-name="T2">* **2.1 L'enchaînement de jeu (Le lancer).**</text:span><text:line-break/><text:line-break/><text:span text:style-name="T2">* **2.2 La mécanique des points (Points &amp; Zones).**</text:span><text:line-break/><text:line-break/><text:line-break/><text:span text:style-name="T2">#### Chapitre 3 : Les Règles de Base du Mouvement (La Technique)</text:span><text:line-break/><text:span text:style-name="T2">* **3.1 Les mouvements autorisés.**</text:span><text:line-break/><text:line-break/><text:span text:style-name="T2">* **3.2 L'interaction avec l'adversaire.**</text:span><text:line-break/><text:line-break/><text:span text:style-name="T2">* **3.3 Le concept de "Douze" et de "Faire sa course".**</text:span><text:line-break/><text:line-break/><text:span text:style-name="T2">#### Chapitre 4 : Avancer et Sécuriser (La Stratégie de Base)</text:span><text:line-break/><text:span text:style-name="T2">* **4.1 La Sécurité : Le "Home Board" et le "Bearing Off".**</text:span><text:line-break/><text:line-break/><text:span text:style-name="T2">* **4.2 Les Tactiques d'Avance.**</text:span><text:line-break/><text:line-break/><text:span text:style-name="T2">* **4.3 La gestion des "Gammers" (Les paires).**</text:span><text:line-break/><text:line-break/><text:line-break/><text:span text:style-name="T2">#### Chapitre 5 : Le Jeu Avancé (La Maîtrise)</text:span><text:line-break/><text:span text:style-name="T2">* **5.1 Le Piège Parfait.**</text:span><text:line-break/><text:span text:style-name="T2">* **5.2 Les Stratégies de "Gagnant-Plein" (Backgammon Blitz).**</text:span><text:line-break/><text:span text:style-name="T2">* **5.3 Pratique et Ressources.**</text:span></text:p>
      <text:p text:style-name="P1"/>
      <text:p text:style-name="P1"/>
      <text:p text:style-name="P1"/>
      <text:p text:style-name="P1"/>
      <text:h text:style-name="P2" text:outline-level="2"><text:soft-page-break/><text:span text:style-name="Strong_20_Emphasis"><text:span text:style-name="T3">Le backgammon est un jeu de stratégie et de chance où le but est de déplacer tous vos pions sur votre plateau et de les sortir avant votre adversaire.</text:span></text:span></text:h>
      <text:h text:style-name="P3" text:outline-level="2">Présentation du jeu</text:h>
      <text:p text:style-name="P4">Le backgammon se joue à deux joueurs sur un plateau divisé en <text:span text:style-name="Strong_20_Emphasis"><text:span text:style-name="T4">24 triangles appelés flèches ou points</text:span></text:span>, regroupés en quatre quarts appelés « jans » Chaque joueur dispose de <text:span text:style-name="Strong_20_Emphasis"><text:span text:style-name="T4">15 pions</text:span></text:span> de couleur différente et utilise <text:span text:style-name="Strong_20_Emphasis"><text:span text:style-name="T4">deux dés</text:span></text:span> pour déterminer les déplacements Une <text:span text:style-name="Strong_20_Emphasis"><text:span text:style-name="T4">barre centrale</text:span></text:span> sépare les plateaux intérieurs et extérieurs de chaque joueur </text:p>
      <text:h text:style-name="P3" text:outline-level="2">Objectif du jeu</text:h>
      <text:p text:style-name="P4">L'objectif est de <text:span text:style-name="Strong_20_Emphasis"><text:span text:style-name="T4">ramener tous vos pions dans votre plateau intérieur</text:span></text:span> puis de les <text:span text:style-name="Strong_20_Emphasis"><text:span text:style-name="T4">sortir du plateau</text:span></text:span> avant votre adversaire Pour cela, vous devez :</text:p>
      <text:list text:style-name="L1">
        <text:list-item>
          <text:p text:style-name="P5">Déplacer vos pions selon le résultat des dés.</text:p>
        </text:list-item>
        <text:list-item>
          <text:p text:style-name="P5">Bloquer ou frapper les pions adverses pour ralentir leur progression.</text:p>
        </text:list-item>
        <text:list-item>
          <text:p text:style-name="P6"><text:span text:style-name="T5">Sortir tous vos pions du plateau pour gagner la partie </text:span></text:p>
        </text:list-item>
      </text:list>
      <text:h text:style-name="P3" text:outline-level="2">Placement initial des pions</text:h>
      <text:p text:style-name="P4">La disposition des pions est standard et symétrique pour les deux joueurs <text:span text:style-name="T6"><draw:a xlink:type="simple" xlink:href="https://www.bing.com/ck/a?!&amp;&amp;p=e0e0f88718824b2b75133e6d49ca5395cec4812421ad6ca475a61b8dcdce00e1JmltdHM9MTc4NDE2MDAwMA&amp;ptn=3&amp;ver=2&amp;hsh=4&amp;fclid=0741df08-bbba-6d0e-28ea-c98eba576c8a&amp;psq=backgammon+pour+les+nuls&amp;u=a1aHR0cHM6Ly93d3cuam91ZXJqZXV4Z3JhdHVpdHMuY29tL3JlZ2xlLWJhY2tnYW1tb24tZXhwbGljYXRpb24tc2ltcGxlLXBvdXItZGVidXRhbnRzLw&amp;ntb=1" office:target-frame-name="_blank" xlink:show="new"><draw:frame draw:style-name="fr1" draw:name="Image6" text:anchor-type="as-char" svg:width="0.37cm" svg:height="0.37cm" draw:z-index="0"><draw:image xlink:href="Pictures/10000001000000C0000000C0FB091444.png" xlink:type="simple" xlink:show="embed" xlink:actuate="onLoad" draw:mime-type="image/png"/><svg:title>jouerjeuxgratuits.com</svg:title></draw:frame></draw:a></text:span><text:a xlink:type="simple" xlink:href="https://www.bing.com/ck/a?!&amp;&amp;p=e0e0f88718824b2b75133e6d49ca5395cec4812421ad6ca475a61b8dcdce00e1JmltdHM9MTc4NDE2MDAwMA&amp;ptn=3&amp;ver=2&amp;hsh=4&amp;fclid=0741df08-bbba-6d0e-28ea-c98eba576c8a&amp;psq=backgammon+pour+les+nuls&amp;u=a1aHR0cHM6Ly93d3cuam91ZXJqZXV4Z3JhdHVpdHMuY29tL3JlZ2xlLWJhY2tnYW1tb24tZXhwbGljYXRpb24tc2ltcGxlLXBvdXItZGVidXRhbnRzLw&amp;ntb=1" office:target-frame-name="_blank" xlink:show="new" text:style-name="Internet_20_link" text:visited-style-name="Visited_20_Internet_20_Link"><text:span text:style-name="T7">jouerjeuxgratuits.com+1</text:span></text:a> :</text:p>
      <text:list text:style-name="L2">
        <text:list-item>
          <text:p text:style-name="P7">2 pions sur la case 24</text:p>
        </text:list-item>
        <text:list-item>
          <text:p text:style-name="P7">5 pions sur la case 13</text:p>
        </text:list-item>
        <text:list-item>
          <text:p text:style-name="P7">3 pions sur la case 8</text:p>
        </text:list-item>
        <text:list-item>
          <text:p text:style-name="P8"><text:span text:style-name="T5">5 pions sur la case 6<text:line-break/>Cette configuration équilibre les possibilités d'attaque et de défense dès le début de la partie </text:span></text:p>
        </text:list-item>
      </text:list>
      <text:h text:style-name="P3" text:outline-level="2">Déroulement du jeu</text:h>
      <text:p text:style-name="P4">Les joueurs déplacent leurs pions <text:span text:style-name="Strong_20_Emphasis"><text:span text:style-name="T4">dans le sens inverse des aiguilles d’une montre</text:span></text:span>, en partant du plateau intérieur de l’adversaire Si un pion se retrouve seul sur un point, il peut être frappé par l’adversaire et placé sur la barre, ce qui oblige le joueur à le réintroduire avant de continuer ses déplacements </text:p>
      <text:h text:style-name="P3" text:outline-level="2"/>
      <text:p text:style-name="P9"><text:span text:style-name="T8"/></text:p>
      <text:h text:style-name="P10" text:outline-level="2">Introduction au Backgammon</text:h>
      <text:p text:style-name="P11"><text:span text:style-name="T8">Le </text:span><text:span text:style-name="Strong_20_Emphasis"><text:span text:style-name="T9">backgammon</text:span></text:span><text:span text:style-name="T8"> est l’un des plus anciens jeux de société, avec des racines qui remontent à des milliers d’années. Ce jeu combine à la fois la </text:span><text:span text:style-name="Strong_20_Emphasis"><text:span text:style-name="T9">stratégie</text:span></text:span><text:span text:style-name="T8"> et la </text:span><text:span text:style-name="Strong_20_Emphasis"><text:span text:style-name="T9">chance</text:span></text:span><text:span text:style-name="T8">, ce qui en fait un défi passionnant pour les joueurs de tous niveaux.</text:span></text:p>
      <text:p text:style-name="P12">Le but du jeu est simple : déplacer tous vos pions dans votre zone de jeu et les retirer avant votre adversaire. Cela peut sembler facile, mais la stratégie joue un rôle crucial.</text:p>
      <text:h text:style-name="P13" text:outline-level="3">Les éléments essentiels du Backgammon</text:h>
      <text:p text:style-name="P12">Avant de plonger dans les règles, voici quelques éléments clés à connaître :</text:p>
      <text:list text:style-name="L3">
        <text:list-item>
          <text:p text:style-name="P14"><text:span text:style-name="Strong_20_Emphasis"><text:span text:style-name="T9">Plateau de jeu</text:span></text:span><text:span text:style-name="T8"> : Un plateau divisé en 24 triangles appelés points.</text:span></text:p>
        </text:list-item>
        <text:list-item>
          <text:p text:style-name="P14"><text:soft-page-break/><text:span text:style-name="Strong_20_Emphasis"><text:span text:style-name="T9">Pions</text:span></text:span><text:span text:style-name="T8"> : Chaque joueur a 15 pions, traditionnellement de couleurs différentes.</text:span></text:p>
        </text:list-item>
        <text:list-item>
          <text:p text:style-name="P14"><text:span text:style-name="Strong_20_Emphasis"><text:span text:style-name="T9">Dés</text:span></text:span><text:span text:style-name="T8"> : Deux dés sont utilisés pour déterminer les mouvements des pions.</text:span></text:p>
        </text:list-item>
      </text:list>
      <text:p text:style-name="P12">Comprendre ces éléments vous aidera à mieux appréhender le jeu et ses règles.</text:p>
      <text:h text:style-name="P10" text:outline-level="2">Objectif du Jeu</text:h>
      <text:p text:style-name="P11"><text:span text:style-name="T8">Le </text:span><text:span text:style-name="Strong_20_Emphasis"><text:span text:style-name="T9">backgammon</text:span></text:span><text:span text:style-name="T8"> est un jeu de société passionnant qui combine stratégie et chance. Son objectif principal est de déplacer tous vos pions dans votre zone de départ et de les sortir du plateau avant votre adversaire.</text:span></text:p>
      <text:p text:style-name="P12"/>
      <text:h text:style-name="P10" text:outline-level="2">Matériel et Plateau de Jeu</text:h>
      <text:h text:style-name="P13" text:outline-level="3">Description du Plateau</text:h>
      <text:p text:style-name="P11"><text:span text:style-name="T8">Le plateau de </text:span><text:span text:style-name="Strong_20_Emphasis"><text:span text:style-name="T9">backgammon</text:span></text:span><text:span text:style-name="T8"> est divisé en quatre quadrants, chacun représentant une partie du jeu. Il comporte 24 triangles appelés </text:span><text:span text:style-name="Strong_20_Emphasis"><text:span text:style-name="T9">points</text:span></text:span><text:span text:style-name="T8">. Les points sont numérotés de 1 à 24, en commençant par le point le plus proche de chaque joueur.</text:span></text:p>
      <text:p text:style-name="P11"><text:span text:style-name="T8">Le plateau est également marqué par deux sections : la </text:span><text:span text:style-name="Strong_20_Emphasis"><text:span text:style-name="T9">zone intérieure</text:span></text:span><text:span text:style-name="T8"> et la </text:span><text:span text:style-name="Strong_20_Emphasis"><text:span text:style-name="T9">zone extérieure</text:span></text:span><text:span text:style-name="T8">. Chaque joueur déplace ses pions vers sa zone intérieure pour tenter de les sortir du jeu.</text:span></text:p>
      <text:h text:style-name="P13" text:outline-level="3">Position Initiale des Pions</text:h>
      <text:p text:style-name="P12">Au début de la partie, chaque joueur place ses pions de la façon suivante :</text:p>
      <text:list text:style-name="L4">
        <text:list-item>
          <text:p text:style-name="P15">2 pions sur le point 24</text:p>
        </text:list-item>
        <text:list-item>
          <text:p text:style-name="P15">5 pions sur le point 13</text:p>
        </text:list-item>
        <text:list-item>
          <text:p text:style-name="P15">3 pions sur le point 8</text:p>
        </text:list-item>
        <text:list-item>
          <text:p text:style-name="P15">5 pions sur le point 6</text:p>
        </text:list-item>
      </text:list>
      <text:p text:style-name="P12">Cette disposition stratégique est cruciale pour bien commencer le jeu. Chaque joueur doit se rappeler que l’objectif est de déplacer tous ses pions vers sa zone intérieure avant de les retirer du plateau.</text:p>
      <text:h text:style-name="P10" text:outline-level="2">Règles de Base du Backgammon</text:h>
      <text:h text:style-name="P13" text:outline-level="3">Sens de Déplacement</text:h>
      <text:p text:style-name="P11"><text:span text:style-name="T8">Au backgammon, chaque joueur déplace ses </text:span><text:span text:style-name="Strong_20_Emphasis"><text:span text:style-name="T9">pions</text:span></text:span><text:span text:style-name="T8"> dans le sens des aiguilles d’une montre. Le but est de ramener tous ses pions dans sa </text:span><text:span text:style-name="Strong_20_Emphasis"><text:span text:style-name="T9">zone de départ</text:span></text:span><text:span text:style-name="T8"> puis de les sortir du plateau. Voici les règles essentielles :</text:span></text:p>
      <text:list text:style-name="L5">
        <text:list-item>
          <text:p text:style-name="P16">Les joueurs lancent deux dés pour déterminer leurs mouvements.</text:p>
        </text:list-item>
        <text:list-item>
          <text:p text:style-name="P16">Chaque joueur doit déplacer ses pions du nombre de cases indiqué sur les dés.</text:p>
        </text:list-item>
        <text:list-item>
          <text:p text:style-name="P16">Un pion peut être déplacé sur une case vide, une case occupée par ses propres pions ou une case avec un seul pion adverse (blot).</text:p>
        </text:list-item>
      </text:list>
      <text:h text:style-name="P13" text:outline-level="3">Début de Partie et Déroulement du Jeu</text:h>
      <text:p text:style-name="P12">La partie commence avec chaque joueur ayant 15 pions sur le plateau. Voici comment cela se déroule :</text:p>
      <text:list text:style-name="L6">
        <text:list-header>
          <text:p text:style-name="P17"/>
          <text:p text:style-name="P17"><text:soft-page-break/></text:p>
        </text:list-header>
        <text:list-item>
          <text:p text:style-name="P17">Si un joueur ne peut pas effectuer un mouvement légal, son tour est passé.</text:p>
        </text:list-item>
      </text:list>
      <text:p text:style-name="P11"><text:span text:style-name="T8">Les joueurs continuent à jouer jusqu’à ce qu’un joueur ait sorti tous ses pions du plateau. Ce joueur est déclaré </text:span><text:span text:style-name="Strong_20_Emphasis"><text:span text:style-name="T9">vainqueur</text:span></text:span><text:span text:style-name="T8">.</text:span></text:p>
      <text:h text:style-name="P10" text:outline-level="2">Les Coups Légaux et Scénarios Spécifiques</text:h>
      <text:p text:style-name="P11"><text:span text:style-name="T8">Au backgammon, chaque coup compte. Il est essentiel de comprendre les </text:span><text:span text:style-name="Strong_20_Emphasis"><text:span text:style-name="T9">coups légaux</text:span></text:span><text:span text:style-name="T8"> que vous pouvez effectuer. Voici un aperçu des mouvements autorisés et de certains scénarios spécifiques qui peuvent se présenter pendant le jeu.</text:span></text:p>
      <text:h text:style-name="P13" text:outline-level="3">1. Déplacement des pions</text:h>
      <text:p text:style-name="P12">Les pions se déplacent en fonction des résultats des dés :</text:p>
      <text:list text:style-name="L7">
        <text:list-item>
          <text:p text:style-name="P18">Un joueur doit déplacer ses pions selon les nombres obtenus sur les dés.</text:p>
        </text:list-item>
        <text:list-item>
          <text:p text:style-name="P18">Un pion peut avancer de la somme des deux dés.</text:p>
        </text:list-item>
        <text:list-item>
          <text:p text:style-name="P18">Il est possible de diviser le mouvement entre deux pions.</text:p>
        </text:list-item>
      </text:list>
      <text:p text:style-name="P12">Par exemple, si vous lancez un 3 et un 5, vous pouvez déplacer un pion de 3 cases et un autre de 5 cases, ou un seul pion de 8 cases (3 + 5).</text:p>
      <text:h text:style-name="P13" text:outline-level="3">2. Prendre un pion adverse</text:h>
      <text:p text:style-name="P11"><text:span text:style-name="T8">Un joueur peut </text:span><text:span text:style-name="Strong_20_Emphasis"><text:span text:style-name="T9">prendre</text:span></text:span><text:span text:style-name="T8"> un pion adverse si celui-ci se trouve sur une case occupée par un seul pion. Cela s’appelle “frapper”. Lorsque cela se produit :</text:span></text:p>
      <text:list text:style-name="L8">
        <text:list-item>
          <text:p text:style-name="P19">Le pion adverse est déplacé sur la barre.</text:p>
        </text:list-item>
        <text:list-item>
          <text:p text:style-name="P19">Le joueur qui a frappé doit ensuite entrer son pion de la barre lors de son prochain tour.</text:p>
        </text:list-item>
      </text:list>
      <text:h text:style-name="P13" text:outline-level="3">3. Les cases interdites</text:h>
      <text:p text:style-name="P12">Il existe des cases où vous ne pouvez pas vous déplacer. Ces cases sont occupées par deux pions ou plus de l’adversaire. Vous devez toujours éviter ces zones.</text:p>
      <text:h text:style-name="P13" text:outline-level="3">4. Doubles</text:h>
      <text:p text:style-name="P11"><text:span text:style-name="T8">Si vous lancez des </text:span><text:span text:style-name="Strong_20_Emphasis"><text:span text:style-name="T9">doubles</text:span></text:span><text:span text:style-name="T8">, vous avez la possibilité de jouer chaque nombre deux fois. Cela vous donne plus de flexibilité pour déplacer vos pions :</text:span></text:p>
      <text:list text:style-name="L9">
        <text:list-item>
          <text:p text:style-name="P20">Par exemple, si vous lancez 4-4, vous pouvez effectuer quatre mouvements de 4 cases.</text:p>
        </text:list-item>
      </text:list>
      <text:h text:style-name="P13" text:outline-level="3">5. Fin de partie</text:h>
      <text:p text:style-name="P12">La partie se termine lorsque l’un des joueurs parvient à retirer tous ses pions de la planche. Ce processus s’appelle le “bear-off”. Il doit être effectué selon les règles de déplacement.</text:p>
      <text:p text:style-name="P11"><text:span text:style-name="T8"/></text:p>
      <text:h text:style-name="P10" text:outline-level="2">Conditions de Victoire et Fin de Partie</text:h>
      <text:p text:style-name="P11"><text:span text:style-name="T8">Le </text:span><text:span text:style-name="Strong_20_Emphasis"><text:span text:style-name="T9">backgammon</text:span></text:span><text:span text:style-name="T8"> est un jeu passionnant où la stratégie et la chance se rencontrent. Comprendre les </text:span><text:span text:style-name="Strong_20_Emphasis"><text:span text:style-name="T9">conditions de victoire</text:span></text:span><text:span text:style-name="T8"> est essentiel pour réussir. Voici les principales règles à connaître.</text:span></text:p>
      <text:h text:style-name="P13" text:outline-level="3"><text:soft-page-break/>Conditions de Victoire</text:h>
      <text:p text:style-name="P12">Pour gagner une partie de backgammon, un joueur doit :</text:p>
      <text:list text:style-name="L10">
        <text:list-item>
          <text:p text:style-name="P21"><text:span text:style-name="Strong_20_Emphasis"><text:span text:style-name="T9">Déplacer tous ses pions</text:span></text:span><text:span text:style-name="T8"> dans sa zone de départ.</text:span></text:p>
        </text:list-item>
        <text:list-item>
          <text:p text:style-name="P21"><text:span text:style-name="Strong_20_Emphasis"><text:span text:style-name="T9">Éliminer</text:span></text:span><text:span text:style-name="T8"> tous ses pions de la planche avant son adversaire.</text:span></text:p>
        </text:list-item>
        <text:list-item>
          <text:p text:style-name="P21"><text:span text:style-name="T8">Atteindre le </text:span><text:span text:style-name="Strong_20_Emphasis"><text:span text:style-name="T9">dernier point</text:span></text:span><text:span text:style-name="T8"> de sa propre maison avec tous ses pions.</text:span></text:p>
        </text:list-item>
      </text:list>
      <text:p text:style-name="P12">Une fois que cela est fait, le joueur annonce sa victoire. Il est important de noter qu’il existe différents types de victoires :</text:p>
      <text:list text:style-name="L11">
        <text:list-item>
          <text:p text:style-name="P22"><text:span text:style-name="Strong_20_Emphasis"><text:span text:style-name="T9">Victoire normale</text:span></text:span><text:span text:style-name="T8"> : Tous les pions sont retirés.</text:span></text:p>
        </text:list-item>
        <text:list-item>
          <text:p text:style-name="P22"><text:span text:style-name="Strong_20_Emphasis"><text:span text:style-name="T9">Victoire en grand</text:span></text:span><text:span text:style-name="T8"> : L’adversaire n’a aucun pion dans sa maison.</text:span></text:p>
        </text:list-item>
        <text:list-item>
          <text:p text:style-name="P22"><text:span text:style-name="Strong_20_Emphasis"><text:span text:style-name="T9">Victoire en match</text:span></text:span><text:span text:style-name="T8"> : Gagner plusieurs parties dans un tournoi.</text:span></text:p>
        </text:list-item>
      </text:list>
      <text:h text:style-name="P13" text:outline-level="3">Fin de Partie</text:h>
      <text:p text:style-name="P12">La partie se termine lorsque l’un des joueurs a retiré tous ses pions de la planche. Cela peut arriver de différentes manières :</text:p>
      <text:list text:style-name="L12">
        <text:list-item>
          <text:p text:style-name="P23">Le joueur qui a réussi à retirer tous ses pions en premier.</text:p>
        </text:list-item>
        <text:list-item>
          <text:p text:style-name="P23">Un joueur abandonne la partie.</text:p>
        </text:list-item>
      </text:list>
      <text:p text:style-name="P11"><text:span text:style-name="T8">Dans certains cas, une partie peut être </text:span><text:span text:style-name="Strong_20_Emphasis"><text:span text:style-name="T9">annulée</text:span></text:span><text:span text:style-name="T8"> ou </text:span><text:span text:style-name="Strong_20_Emphasis"><text:span text:style-name="T9">rejouée</text:span></text:span><text:span text:style-name="T8">. Cela se produit généralement si des erreurs de règles surviennent. Il est important de discuter des règles avant de commencer une partie pour éviter toute confusion.</text:span></text:p>
      <text:p text:style-name="P11"><text:span text:style-name="T8">En conclusion, connaître les </text:span><text:span text:style-name="Strong_20_Emphasis"><text:span text:style-name="T9">conditions de victoire</text:span></text:span><text:span text:style-name="T8"> et la manière dont une partie se termine est crucial pour chaque joueur de backgammon. Cela permet d’avoir un objectif clair et de se concentrer sur la stratégie à adopter.</text:span></text:p>
      <text:h text:style-name="P24" text:outline-level="2"/>
      <text:list text:style-name="L13">
        <text:list-header>
          <text:p text:style-name="P25"><text:span text:style-name="T8"/></text:p>
        </text:list-header>
      </text:list>
      <text:h text:style-name="P13" text:outline-level="3">Quels sont les termes clés du backgammon ?</text:h>
      <text:p text:style-name="P12">Voici quelques termes importants à connaître :</text:p>
      <table:table table:name="Tableau1" table:style-name="Tableau1">
        <table:table-column table:style-name="Tableau1.A"/>
        <table:table-column table:style-name="Tableau1.B"/>
        <table:table-row>
          <table:table-cell table:style-name="Tableau1.A1" office:value-type="string">
            <text:p text:style-name="P26">Terme</text:p>
          </table:table-cell>
          <table:table-cell table:style-name="Tableau1.A1" office:value-type="string">
            <text:p text:style-name="P26">Définition</text:p>
          </table:table-cell>
        </table:table-row>
        <table:table-row>
          <table:table-cell table:style-name="Tableau1.A1" office:value-type="string">
            <text:p text:style-name="P27">Bar</text:p>
          </table:table-cell>
          <table:table-cell table:style-name="Tableau1.A1" office:value-type="string">
            <text:p text:style-name="P27">Zone centrale où les pions capturés sont placés.</text:p>
          </table:table-cell>
        </table:table-row>
        <table:table-row>
          <table:table-cell table:style-name="Tableau1.A1" office:value-type="string">
            <text:p text:style-name="P27">Blot</text:p>
          </table:table-cell>
          <table:table-cell table:style-name="Tableau1.A1" office:value-type="string">
            <text:p text:style-name="P27">Pion isolé sur une case.</text:p>
          </table:table-cell>
        </table:table-row>
        <table:table-row>
          <table:table-cell table:style-name="Tableau1.A1" office:value-type="string">
            <text:p text:style-name="P27">Domicile</text:p>
          </table:table-cell>
          <table:table-cell table:style-name="Tableau1.A1" office:value-type="string">
            <text:p text:style-name="Table_20_Contents">Les six dernières cases du plateau d’un joueur.</text:p>
          </table:table-cell>
        </table:table-row>
      </table:table>
      <text:h text:style-name="P28" text:outline-level="3"/>
      <text:h text:style-name="P13" text:outline-level="3">Quelle est la meilleure stratégie au backgammon ?</text:h>
      <text:p text:style-name="P12">Une bonne stratégie inclut :</text:p>
      <text:list text:style-name="L14">
        <text:list-item>
          <text:p text:style-name="P29">Protéger vos pions.</text:p>
        </text:list-item>
        <text:list-item>
          <text:p text:style-name="P29">Contrôler le centre du plateau.</text:p>
        </text:list-item>
        <text:list-item>
          <text:p text:style-name="P29">Éviter de laisser des blots.</text:p>
        </text:list-item>
      </text:list>
      <text:p text:style-name="P12">En suivant ces conseils, vous augmenterez vos chances de gagner.</text:p>
      <text:p text:style-name="P30"><text:span text:style-name="Strong_20_Emphasis"><text:span text:style-name="T9">Le backgammon est un </text:span></text:span><text:a xlink:type="simple" xlink:href="https://www.jouer-au-backgammon.com/blog-actualites-backgammon/debuter-au-jeu-de-backgammon.html" text:style-name="Internet_20_link" text:visited-style-name="Visited_20_Internet_20_Link"><text:span text:style-name="Strong_20_Emphasis"><text:span text:style-name="T10">jeu de société</text:span></text:span></text:a><text:span text:style-name="Strong_20_Emphasis"><text:span text:style-name="T9"> ancien qui date du XXème siècle.</text:span></text:span></text:p>
      <text:p text:style-name="P31"><text:soft-page-break/>Il s’agit d’un jeu de hasard et de stratégie qui se joue à deux joueurs avec des dés et des pions. Le backgammon est originaire de l’Asie Mineure et a été popularisé en Occident au XXème siècle.</text:p>
      <text:p text:style-name="P31">Le jeu de backgammon se joue sur un plateau rectangulaire comportant 24 cases appelées points. Chaque joueur dispose de 15 pions qu’il doit faire avancer en fonction des résultats des dés. Le but du jeu est d’être le premier à retirer tous ses pions du plateau.</text:p>
      <text:p text:style-name="P31">Le backgammon est un jeu de hasard mais également de stratégie. En effet, les joueurs doivent non seulement décider quelle case occuper mais également choisir la meilleure stratégie pour gagner la partie.</text:p>
      <text:p text:style-name="P31">Le backgammon est un jeu ancien qui a été popularisé en Occident au XXème siècle. Il s’agit d’un jeu de hasard et de stratégie qui se joue à deux joueurs avec des dés et des pions. Le backgammon est originaire de l’Asie Mineure et a été popularisé en Occident au XXème siècle.</text:p>
      <text:p text:style-name="P31">Le backgammon est donc un jeu passionnant qui demande à la fois de la chance et de la stratégie. Si vous souhaitez apprendre à y jouer, n’hésitez pas à suivre les instructions de présentes sur ce site !</text:p>
      <text:p text:style-name="P32"> </text:p>
      <text:p text:style-name="P33"><text:span text:style-name="Strong_20_Emphasis"><text:span text:style-name="T9">Le backgammon est un jeu de hasard et de stratégie qui se joue à deux joueurs.</text:span></text:span></text:p>
      <text:p text:style-name="P31">L’objectif du jeu est de retirer tous ses pions du plateau avant l’adversaire. Le jeu se joue avec des dés et des pions sur un plateau divisé en 24 cases ou points.</text:p>
      <text:p text:style-name="P31">Les joueurs jouent à tour de rôle et lancé les deux dés en même temps. Ils doivent ensuite faire avancer leurs pions en fonction des résultats des dés.</text:p>
      <text:p text:style-name="P31">Les pions peuvent être avancés d’un ou deux points par tour. Si un joueur fait un double, il peut faire avancer ses pions deux fois plus. Les pions ne peuvent pas être avancés sur une case occupée par deux ou plus de pions adverses. Si un joueur n’a pas de pion sur la case de départ, il doit d’abord retirer un pion adverse avant de pouvoir y mettre le sien.</text:p>
      <text:p text:style-name="P31">Le joueur qui retire tous ses pions du plateau en premier gagne la partie. Le backgammon est un jeu de hasard, mais la stratégie y est également très importante. Les joueurs doivent savoir quand attaquer et quand se défendre. La plupart des stratégies du backgammon sont basées sur la probabilité. Les joueurs doivent connaître les chances de faire certains coups et agir en conséquence.</text:p>
      <text:p text:style-name="P31">Le backgammon est un jeu très amusant et captivant. Il peut être joué en ligne ou en personne.</text:p>
      <text:p text:style-name="P32"> </text:p>
      <text:p text:style-name="P33"><text:span text:style-name="Strong_20_Emphasis"><text:span text:style-name="T9">Le backgammon est originaire de l’Asie Mineure et a été introduit en Europe au Moyen Âge.</text:span></text:span></text:p>
      <text:p text:style-name="P31"><text:soft-page-break/>Le backgammon est un jeu de table très ancien. On pense qu’il a été inventé au Moyen-Orient, il y a plus de 5000 ans.</text:p>
      <text:p text:style-name="P31">Le Backgammon se joue avec deux joueurs, chacun possédant quinze pions. Le but du jeu est de faire sortir ses pions avant son adversaire. Les pions sont déplacés en fonction des résultats obtenus avec les dés.</text:p>
      <text:p text:style-name="P31">Le backgammon est mentionné dans de nombreux textes anciens, comme la Bible.</text:p>
      <text:p text:style-name="P31">Le Backgammon est un jeu de société originaire de l’Asie Mineure. Il a été introduit en Europe au Moyen Âge par les Croisés, qui l’ont rapporté d’Orient.</text:p>
      <text:p text:style-name="P31">On pense qu’il a été inventé par les Sumériens, les Babyloniens ou les Égyptiens. Le jeu s’est ensuite propagé en Grèce, en Rome et en Europe.</text:p>
      <text:p text:style-name="P31">Le Backgammon a connu un grand succès en Europe au cours du XVIe siècle. Il était alors fréquemment joué dans les cours royales. Au XVIIIe siècle, le jeu connut un regain d’intérêt avec la publication de nombreux ouvrages sur le sujet.</text:p>
      <text:p text:style-name="P31">Le backgammon a connu un regain de popularité au XXe siècle. De nombreuses compétitions sont organisées chaque année et des millions de personnes jouent au backgammon en ligne.</text:p>
      <text:p text:style-name="P31">Aujourd’hui, le Backgammon est un jeu apprécié des amateurs de jeux de stratégie. Il se joue encore dans de nombreux pays du mo</text:p>
      <text:h text:style-name="P34" text:outline-level="2">Les termes de base du Backgammon</text:h>
      <text:p text:style-name="P33"><text:span text:style-name="T8">Le</text:span><text:span text:style-name="T9"> </text:span><text:span text:style-name="Strong_20_Emphasis"><text:span text:style-name="T9">Backgammon</text:span></text:span><text:span text:style-name="T9"> </text:span><text:span text:style-name="T8">est un jeu de société passionnant qui se joue à deux joueurs avec des dés et des pions sur un plateau. Comprendre les termes de base du Backgammon est essentiel pour bien jouer et apprécier ce jeu.</text:span></text:p>
      <text:p text:style-name="P33"><text:span text:style-name="T8">Voici quelques termes clés du</text:span><text:span text:style-name="T9"> </text:span><text:span text:style-name="Strong_20_Emphasis"><text:span text:style-name="T9">Glossaire Backgammon</text:span></text:span><text:span text:style-name="T9"> </text:span><text:span text:style-name="T8">:</text:span></text:p>
      <text:list text:style-name="L15">
        <text:list-item>
          <text:p text:style-name="P35"><text:span text:style-name="Strong_20_Emphasis"><text:span text:style-name="T9">Barre</text:span></text:span><text:span text:style-name="T9"> </text:span><text:span text:style-name="T8">: la barre divise le plateau en deux parties égales appelées l’intérieur et l’extérieur.</text:span></text:p>
        </text:list-item>
        <text:list-item>
          <text:p text:style-name="P35"><text:span text:style-name="Strong_20_Emphasis"><text:span text:style-name="T9">Points</text:span></text:span><text:span text:style-name="T9"> </text:span><text:span text:style-name="T8">: il y a 24 points sur le plateau, numérotés de 1 à 24. Les points sont reliés par des flèches qui indiquent la direction dans laquelle les pions peuvent se déplacer.</text:span></text:p>
        </text:list-item>
        <text:list-item>
          <text:p text:style-name="P35"><text:span text:style-name="Strong_20_Emphasis"><text:span text:style-name="T9">Pions</text:span></text:span><text:span text:style-name="T9"> </text:span><text:span text:style-name="T8">: chaque joueur dispose de 15 pions, appelés également “checkers”.</text:span></text:p>
          <text:p text:style-name="P35"><text:span text:style-name="T8"/></text:p>
        </text:list-item>
        <text:list-item>
          <text:p text:style-name="P35"><text:span text:style-name="Strong_20_Emphasis"><text:span text:style-name="T9">Jouer un coup</text:span></text:span><text:span text:style-name="T9"> </text:span><text:span text:style-name="T8">: lorsqu’un joueur lance les dés, il doit déplacer ses pions selon les nombres indiqués par les dés. Il peut effectuer plusieurs mouvements avec différents pions pendant son tour.</text:span></text:p>
        </text:list-item>
        <text:list-item>
          <text:p text:style-name="P35"><text:span text:style-name="Strong_20_Emphasis"><text:span text:style-name="T9">Sortie/Éjection</text:span></text:span><text:span text:style-name="T9"> </text:span><text:span text:style-name="T8">: lorsque qu’un ou plusieurs Pion(s) d’un adversaire est (sont) frappé(s), celui-ci doit recommencer depuis la case départ ou barre.</text:span></text:p>
        </text:list-item>
      </text:list>
      <text:p text:style-name="P33"><text:span text:style-name="T8">En connaissant ces termes, vous pouvez mieux comprendre comment </text:span><text:a xlink:type="simple" xlink:href="https://www.jouer-au-backgammon.com/blog-actualites-backgammon/decouvrez-les-astuces-pour-progresser-rapidement-au-backgammon.html" text:style-name="Internet_20_link" text:visited-style-name="Visited_20_Internet_20_Link"><text:span text:style-name="T10">jouer au Backgammon</text:span></text:a><text:span text:style-name="T8"> et améliorer votre stratégie. Il existe bien sûr beaucoup plus de termes spécifiques au Backgammon mais ceux ci-dessus constituent une bonne base pour débuter.</text:span></text:p>
      <text:p text:style-name="P32"><text:soft-page-break/> </text:p>
      <text:h text:style-name="P36" text:outline-level="2">Les règles du mouvement des pions</text:h>
      <text:p text:style-name="P33"><text:span text:style-name="T8">Le</text:span><text:span text:style-name="T9"> </text:span><text:span text:style-name="Strong_20_Emphasis"><text:span text:style-name="T9">Backgammon</text:span></text:span><text:span text:style-name="T9"> </text:span><text:span text:style-name="T8">est un jeu de société très populaire qui se joue à deux joueurs. Il se compose d’un plateau, de 15 pions noirs, 15 pions blancs et deux dés. Les mouvements des pions sont régis par des règles strictes que tout joueur doit connaître pour jouer efficacement.</text:span></text:p>
      <text:list text:style-name="L16">
        <text:list-item>
          <text:p text:style-name="P37"><text:span text:style-name="T8">Le</text:span><text:span text:style-name="T9"> </text:span><text:span text:style-name="Strong_20_Emphasis"><text:span text:style-name="T9">bar</text:span></text:span><text:span text:style-name="T9"> </text:span><text:span text:style-name="T8">: C’est la barre située au centre du plateau qui sépare les cases intérieures et extérieures. Lorsqu’un ou plusieurs pions sont frappés par l’adversaire, ils doivent être placés sur le bar avant de pouvoir être remis en jeu.</text:span></text:p>
        </text:list-item>
        <text:list-item>
          <text:p text:style-name="P37"><text:span text:style-name="T8">Les</text:span><text:span text:style-name="T9"> </text:span><text:span text:style-name="Strong_20_Emphasis"><text:span text:style-name="T9">cases</text:span></text:span><text:span text:style-name="T9"> </text:span><text:span text:style-name="T8">: Le plateau est composé de 24 cases numérotées de 1 à 24. Elles sont divisées en quatre quadrants (les cases intérieures et extérieures) et chacune peut contenir un ou plusieurs pions.</text:span></text:p>
        </text:list-item>
        <text:list-item>
          <text:p text:style-name="P37"><text:span text:style-name="T8">La</text:span><text:span text:style-name="T9"> </text:span><text:span text:style-name="Strong_20_Emphasis"><text:span text:style-name="T9">pointe</text:span></text:span><text:span text:style-name="T9"> </text:span><text:span text:style-name="T8">: Chaque case possède une pointe correspondant à son numéro. Par exemple, la première pointe correspond à la case numéro 1.</text:span></text:p>
        </text:list-item>
        <text:list-item>
          <text:p text:style-name="P37"><text:span text:style-name="T8">Le</text:span><text:span text:style-name="T9"> </text:span><text:span text:style-name="Strong_20_Emphasis"><text:span text:style-name="T9">mouvement</text:span></text:span><text:span text:style-name="T9"> </text:span><text:span text:style-name="T8">: Les pions se déplacent dans le sens contraire des aiguilles d’une montre autour du plateau selon les nombres obtenus sur les dés. Un joueur peut déplacer un ou deux pions selon le résultat obtenu sur les dés.</text:span></text:p>
        </text:list-item>
        <text:list-item>
          <text:p text:style-name="P37"><text:span text:style-name="T8">La</text:span><text:span text:style-name="T9"> </text:span><text:span text:style-name="Strong_20_Emphasis"><text:span text:style-name="T9">sortie</text:span></text:span><text:span text:style-name="T9"> </text:span><text:span text:style-name="T8">: Pour gagner une partie, un joueur doit sortir tous ses pions du plateau avant son adversaire. Pour sortir un pion, il doit atteindre la case numéro 24 puis être retiré du plateau.</text:span></text:p>
        </text:list-item>
      </text:list>
      <text:p text:style-name="P31"/>
      <text:p text:style-name="P32"> </text:p>
      <text:h text:style-name="P38" text:outline-level="2"/>
      <text:p text:style-name="P31"/>
      <text:p text:style-name="P32"> </text:p>
      <text:h text:style-name="P38" text:outline-level="2"/>
      <text:p text:style-name="P32"> </text:p>
      <text:h text:style-name="P38" text:outline-level="2"/>
      <text:p text:style-name="P32"> </text:p>
      <text:h text:style-name="P38" text:outline-level="2"/>
      <text:p text:style-name="P32"> </text:p>
      <text:h text:style-name="P38" text:outline-level="2"><text:span text:style-name="Strong_20_Emphasis"><text:span text:style-name="T9"/></text:span></text:h>
      <text:p text:style-name="P31"/>
      <text:p text:style-name="P32"> </text:p>
      <text:h text:style-name="P38" text:outline-level="2"/>
      <text:p text:style-name="P32"> </text:p>
      <text:h text:style-name="P36" text:outline-level="2"><text:soft-page-break/>Comment construire une défense solide</text:h>
      <text:p text:style-name="P31">Le Backgammon est un jeu de société très populaire dans le monde entier. Il est essentiel de comprendre les termes utilisés pour apprendre à jouer et construire une défense solide. Voici un glossaire des termes couramment utilisés :</text:p>
      <text:list text:style-name="L17">
        <text:list-item>
          <text:p text:style-name="P39"><text:span text:style-name="Strong_20_Emphasis"><text:span text:style-name="T9">Bar</text:span></text:span><text:span text:style-name="T9"> </text:span><text:span text:style-name="T8">: La barre sépare le tableau en deux parties égales, chacune ayant 12 points.</text:span></text:p>
        </text:list-item>
        <text:list-item>
          <text:p text:style-name="P39"><text:span text:style-name="Strong_20_Emphasis"><text:span text:style-name="T9">Blot</text:span></text:span><text:span text:style-name="T9"> </text:span><text:span text:style-name="T8">: Un point occupé par un seul pion est appelé blot. Les blots sont vulnérables aux attaques adverses.</text:span></text:p>
        </text:list-item>
        <text:list-item>
          <text:p text:style-name="P39"><text:span text:style-name="Strong_20_Emphasis"><text:span text:style-name="T9">Coup de la chance</text:span></text:span><text:span text:style-name="T9"> </text:span><text:span text:style-name="T8">: Un coup qui réussit grâce à la chance plutôt qu’à une stratégie planifiée.</text:span></text:p>
        </text:list-item>
        <text:list-item>
          <text:p text:style-name="P39"><text:span text:style-name="Strong_20_Emphasis"><text:span text:style-name="T9">Cube</text:span></text:span><text:span text:style-name="T9"> </text:span><text:span text:style-name="T8">: Le cube sert à multiplier la valeur du jeu lorsqu’un joueur pense qu’il a l’avantage. Il peut être proposé ou accepté au cours d’un match.</text:span></text:p>
        </text:list-item>
        <text:list-item>
          <text:p text:style-name="P39"><text:span text:style-name="Strong_20_Emphasis"><text:span text:style-name="T9">Débutant’s luck</text:span></text:span><text:span text:style-name="T9"> </text:span><text:span text:style-name="T8">: La chance des débutants, c’est lorsque quelqu’un qui ne connaît pas bien le jeu gagne contre un joueur plus expérimenté grâce à la chance plutôt qu’à sa compétence.</text:span></text:p>
        </text:list-item>
        <text:list-item>
          <text:p text:style-name="P39"><text:span text:style-name="Strong_20_Emphasis"><text:span text:style-name="T9">Doublon</text:span></text:span><text:span text:style-name="T9"> </text:span><text:span text:style-name="T8">: Lorsque les deux dés montrent le même nombre, ce qui donne au joueur le droit de jouer chaque numéro deux fois.</text:span></text:p>
        </text:list-item>
      </text:list>
      <text:p text:style-name="P31">En comprenant ces termes du glossaire Backgammon, vous pouvez améliorer votre compréhension et votre stratégie pour construire une défense solide dans ce jeu passionnant !</text:p>
      <text:p text:style-name="P32"> </text:p>
      <text:h text:style-name="P36" text:outline-level="2">Les tactiques avancées pour bloquer ou attaquer l’adversaire.</text:h>
      <text:p text:style-name="P31">Le backgammon est un jeu de stratégie qui implique des mouvements tactiques pour bloquer ou attaquer l’adversaire. Voici quelques tactiques avancées que vous pouvez utiliser pour améliorer votre jeu :</text:p>
      <text:list text:style-name="L18">
        <text:list-item>
          <text:p text:style-name="P40"><text:span text:style-name="Strong_20_Emphasis"><text:span text:style-name="T9">Bar point</text:span></text:span><text:span text:style-name="T9"> </text:span><text:span text:style-name="T8">: Le point barrière est le point situé à la frontière entre le tableau intérieur et extérieur. Bloquer ce point peut empêcher l’adversaire de sortir ses pions.</text:span></text:p>
        </text:list-item>
        <text:list-item>
          <text:p text:style-name="P40"><text:span text:style-name="Strong_20_Emphasis"><text:span text:style-name="T9">Blitz</text:span></text:span><text:span text:style-name="T9"> </text:span><text:span text:style-name="T8">: Une stratégie agressive où vous essayez d’éliminer les pions de votre adversaire rapidement, en les bloquant sur leur propre territoire.</text:span></text:p>
        </text:list-item>
        <text:list-item>
          <text:p text:style-name="P40"><text:span text:style-name="Strong_20_Emphasis"><text:span text:style-name="T9">Coup d’ouverture</text:span></text:span><text:span text:style-name="T9"> </text:span><text:span text:style-name="T8">: Le premier coup joué dans une partie, souvent utilisé pour établir une position solide et contrôler le centre du plateau.</text:span></text:p>
        </text:list-item>
        <text:list-item>
          <text:p text:style-name="P40"><text:span text:style-name="Strong_20_Emphasis"><text:span text:style-name="T9">Double hit</text:span></text:span><text:span text:style-name="T9"> </text:span><text:span text:style-name="T8">: Lorsque deux pions sont frappés simultanément par un seul coup, cela peut être particulièrement efficace lorsqu’ils sont proches l’un de l’autre.</text:span></text:p>
        </text:list-item>
        <text:list-item>
          <text:p text:style-name="P40"><text:span text:style-name="Strong_20_Emphasis"><text:span text:style-name="T9">Gammon et Backgammon</text:span></text:span><text:span text:style-name="T9"> </text:span><text:span text:style-name="T8">: Des termes utilisés pour décrire des victoires plus importantes où un joueur réussit à sortir tous ses pions avant son adversaire. Un gammon compte comme deux points tandis qu’un backgammon en vaut trois.</text:span></text:p>
        </text:list-item>
      </text:list>
      <text:p text:style-name="P32"><text:soft-page-break/> </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style:font-face style:name="OpenSymbol" svg:font-family="OpenSymbol" style:font-charset="x-symbol"/>
    <style:font-face style:name="Roboto" svg:font-family="Roboto,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6T16:28:29.842129100</meta:creation-date>
    <meta:print-date>2026-07-16T16:57:00.736919900</meta:print-date>
    <dc:date>2026-07-16T17:24:02.292488500</dc:date>
    <meta:editing-duration>PT2M12S</meta:editing-duration>
    <meta:editing-cycles>1</meta:editing-cycles>
    <meta:document-statistic meta:table-count="1" meta:image-count="1" meta:object-count="0" meta:page-count="10" meta:paragraph-count="170" meta:word-count="3059" meta:character-count="17286" meta:non-whitespace-character-count="14409"/>
    <meta:generator>LibreOffice/26.2.4.2$Windows_X86_64 LibreOffice_project/0229ac93fcf0d7cbc6376066c6f35021cef002dc</meta:generator>
  </office:meta>
</office:document-meta>
</file>